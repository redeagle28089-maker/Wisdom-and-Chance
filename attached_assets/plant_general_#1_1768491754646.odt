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lant General #1</text:p>
      <text:p text:style-name="Standard"/>
      <text:p text:style-name="Standard">When you win a battle, you gain an advance counter for each unit/s you had in the battle.</text:p>
      <text:p text:style-name="Standard"/>
      <text:p text:style-name="Standard">When you lose a battle, you gain an defeat counter for each unit/s you had in the battle.</text:p>
      <text:p text:style-name="Standard"/>
      <text:p text:style-name="Standard">Once per turn you can remove 4 advance counters from this card this effect during the effect during the effect phase. All non plants units minus 2.</text:p>
      <text:p text:style-name="Standard"/>
      <text:p text:style-name="Standard">Once per turn you can remove 10 advance counters to activate this effect during the effect phase.</text:p>
      <text:p text:style-name="Standard">Inflict 2 damge to your oppents for 3 turn</text:p>
      <text:p text:style-name="Standard"/>
      <text:p text:style-name="Standard">Once per turn you can remove 4 defeat counters during the effect phase to applie this effect.</text:p>
      <text:p text:style-name="Standard"><text:s/>to a make unit you controll heal 4 damge during this battle</text:p>
      <text:p text:style-name="Standard"/>
      <text:p text:style-name="Standard">Once per turn you can remove 10 defeat counters to play a plant unit from your hand during the deployment phase.</text:p>
      <text:p text:style-name="Standard"/>
      <text:p text:style-name="Standard">Once per turn you can remove 4 advance and 4 defeat counters, then you can reveal as many number of plant units in your hand and shuffle them into the deck. Then draw cards equal to the number of cards you shuffled into the d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 Myers</meta:initial-creator>
    <meta:creation-date>2017-04-19T17:39:28</meta:creation-date>
    <meta:document-statistic meta:table-count="0" meta:image-count="0" meta:object-count="0" meta:page-count="1" meta:paragraph-count="10" meta:word-count="188" meta:character-count="978"/>
    <dc:date>2017-04-19T17:57:23</dc:date>
    <dc:creator>Bret Myers</dc:creator>
    <meta:editing-duration>PT2M44S</meta:editing-duration>
    <meta:editing-cycles>1</meta:editing-cycles>
    <meta:generator>OpenOffice.org/3.4.1$Unix OpenOffice.org_project/341m1$Build-9593</meta:generator>
  </office:meta>
</office:document-meta>
</file>